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бщество с ограниченной ответственностью <text:s text:c="2"/>«БархатТрэвел»</text:p>
      <text:p text:style-name="Standard">Юридический адрес: ул. Центральная, д. 2, ком. 3, 211293, агр. Близница, Полоцкий район, Витебская обл., Республика Беларусь</text:p>
      <text:p text:style-name="Standard">Почтовый адрес структурного подразделения: 211401, Республика Беларусь, Витебская область, г.Полоцк, ул. Октябрьская, д.54, пом. 408 </text:p>
      <text:p text:style-name="Standard">тел. +375 29 604-12-34; +375 29 214 20 06.</text:p>
      <text:p text:style-name="Standard">УНП 391956930</text:p>
      <text:p text:style-name="Standard">Р/сч структурного подразделения: BY48SLAN30125480500000400000 в Дополнительный офис N 303 ЗАО Банк ВТБ (Беларусь) 211413, г. Полоцк, ул. Евфросиньи Полоцкой, 27 <text:s text:c="2"/>Код банка SLANBY22</text:p>
      <text:p text:style-name="Standard">e-mail: <text:a xlink:type="simple" xlink:href="mailto:ooobarhattravel@mail.ru" text:style-name="Internet_20_link" text:visited-style-name="Visited_20_Internet_20_Link">ooobarhattravel@mail.ru</text:a></text:p>
      <text:p text:style-name="Standard"/>
      <text:p text:style-name="Standard">Общество с ограниченной ответственностью «БархатТрэвел», <text:s text:c="2"/>в лице директора необособленного структурного подразделения Заидовой Д.В., действующего на основании доверенности <text:s/>№ 4 <text:s/>от 05.01.2026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01:12:05.883319000</meta:creation-date>
    <dc:date>2026-06-21T01:12:35.333952000</dc:date>
    <meta:editing-duration>PT29S</meta:editing-duration>
    <meta:editing-cycles>1</meta:editing-cycles>
    <meta:generator>LibreOffice/26.2.3.2$MacOSX_AARCH64 LibreOffice_project/70e089b17412e4cb7773e41413306b17a2328c34</meta:generator>
    <meta:document-statistic meta:table-count="0" meta:image-count="0" meta:object-count="0" meta:page-count="1" meta:paragraph-count="8" meta:word-count="94" meta:character-count="775" meta:non-whitespace-character-count="680"/>
  </office:meta>
</office:document-meta>
</file>